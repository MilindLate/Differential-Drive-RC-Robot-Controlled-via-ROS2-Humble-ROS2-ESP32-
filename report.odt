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0736in"/>
    </style:style>
    <style:style style:name="Table1.B" style:family="table-column">
      <style:table-column-properties style:column-width="1.2924in"/>
    </style:style>
    <style:style style:name="Table1.C" style:family="table-column">
      <style:table-column-properties style:column-width="0.7104in"/>
    </style:style>
    <style:style style:name="Table1.D" style:family="table-column">
      <style:table-column-properties style:column-width="1.6097in"/>
    </style:style>
    <style:style style:name="Table1.E" style:family="table-column">
      <style:table-column-properties style:column-width="0.9806in"/>
    </style:style>
    <style:style style:name="Table1.F" style:family="table-column">
      <style:table-column-properties style:column-width="1.026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0424in"/>
    </style:style>
    <style:style style:name="Table2.B" style:family="table-column">
      <style:table-column-properties style:column-width="0.8486in"/>
    </style:style>
    <style:style style:name="Table2.C" style:family="table-column">
      <style:table-column-properties style:column-width="1.2069in"/>
    </style:style>
    <style:style style:name="Table2.D" style:family="table-column">
      <style:table-column-properties style:column-width="3.595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5556in" table:align="left"/>
    </style:style>
    <style:style style:name="Table3.A" style:family="table-column">
      <style:table-column-properties style:column-width="0.834in"/>
    </style:style>
    <style:style style:name="Table3.B" style:family="table-column">
      <style:table-column-properties style:column-width="0.6in"/>
    </style:style>
    <style:style style:name="Table3.C" style:family="table-column">
      <style:table-column-properties style:column-width="0.7292in"/>
    </style:style>
    <style:style style:name="Table3.D" style:family="table-column">
      <style:table-column-properties style:column-width="0.8611in"/>
    </style:style>
    <style:style style:name="Table3.E" style:family="table-column">
      <style:table-column-properties style:column-width="0.9639in"/>
    </style:style>
    <style:style style:name="Table3.F" style:family="table-column">
      <style:table-column-properties style:column-width="1.567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5493in" table:align="left"/>
    </style:style>
    <style:style style:name="Table4.A" style:family="table-column">
      <style:table-column-properties style:column-width="1.0201in"/>
    </style:style>
    <style:style style:name="Table4.B" style:family="table-column">
      <style:table-column-properties style:column-width="0.8389in"/>
    </style:style>
    <style:style style:name="Table4.C" style:family="table-column">
      <style:table-column-properties style:column-width="0.8757in"/>
    </style:style>
    <style:style style:name="Table4.D" style:family="table-column">
      <style:table-column-properties style:column-width="1.8146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441in" table:align="left"/>
    </style:style>
    <style:style style:name="Table5.A" style:family="table-column">
      <style:table-column-properties style:column-width="0.8493in"/>
    </style:style>
    <style:style style:name="Table5.B" style:family="table-column">
      <style:table-column-properties style:column-width="1.5917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6931in" table:align="left"/>
    </style:style>
    <style:style style:name="Table6.A" style:family="table-column">
      <style:table-column-properties style:column-width="2.5694in"/>
    </style:style>
    <style:style style:name="Table6.B" style:family="table-column">
      <style:table-column-properties style:column-width="0.9681in"/>
    </style:style>
    <style:style style:name="Table6.C" style:family="table-column">
      <style:table-column-properties style:column-width="3.1556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 style:list-style-name="L5">
      <style:paragraph-properties fo:margin-top="0in" fo:margin-bottom="0.1965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in" fo:margin-bottom="0in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in" fo:margin-bottom="0in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5">
      <style:paragraph-properties fo:margin-top="0in" fo:margin-bottom="0in" style:contextual-spacing="false"/>
    </style:style>
    <style:style style:name="P33" style:family="paragraph" style:parent-style-name="Text_20_body" style:list-style-name="L16"/>
    <style:style style:name="P34" style:family="paragraph" style:parent-style-name="Text_20_body" style:list-style-name="L16">
      <style:paragraph-properties fo:margin-top="0in" fo:margin-bottom="0in" style:contextual-spacing="false"/>
    </style:style>
    <style:style style:name="P35" style:family="paragraph" style:parent-style-name="Text_20_body" style:list-style-name="L17"/>
    <style:style style:name="P36" style:family="paragraph" style:parent-style-name="Text_20_body" style:list-style-name="L17">
      <style:paragraph-properties fo:margin-top="0in" fo:margin-bottom="0in" style:contextual-spacing="false"/>
    </style:style>
    <style:style style:name="P37" style:family="paragraph" style:parent-style-name="Text_20_body" style:list-style-name="L18"/>
    <style:style style:name="P38" style:family="paragraph" style:parent-style-name="Text_20_body" style:list-style-name="L18">
      <style:paragraph-properties fo:margin-top="0in" fo:margin-bottom="0in" style:contextual-spacing="false"/>
    </style:style>
    <style:style style:name="P39" style:family="paragraph" style:parent-style-name="Text_20_body" style:list-style-name="L19"/>
    <style:style style:name="P40" style:family="paragraph" style:parent-style-name="Text_20_body" style:list-style-name="L19">
      <style:paragraph-properties fo:margin-top="0in" fo:margin-bottom="0in" style:contextual-spacing="false"/>
    </style:style>
    <style:style style:name="P41" style:family="paragraph" style:parent-style-name="Text_20_body" style:list-style-name="L20"/>
    <style:style style:name="P42" style:family="paragraph" style:parent-style-name="Text_20_body" style:list-style-name="L20">
      <style:paragraph-properties fo:margin-top="0in" fo:margin-bottom="0in" style:contextual-spacing="false"/>
    </style:style>
    <style:style style:name="P43" style:family="paragraph" style:parent-style-name="Text_20_body" style:list-style-name="L21"/>
    <style:style style:name="P44" style:family="paragraph" style:parent-style-name="Text_20_body" style:list-style-name="L21">
      <style:paragraph-properties fo:margin-top="0in" fo:margin-bottom="0in" style:contextual-spacing="false"/>
    </style:style>
    <style:style style:name="P45" style:family="paragraph" style:parent-style-name="Text_20_body" style:list-style-name="L22"/>
    <style:style style:name="P46" style:family="paragraph" style:parent-style-name="Text_20_body" style:list-style-name="L22">
      <style:paragraph-properties fo:margin-top="0in" fo:margin-bottom="0in" style:contextual-spacing="false"/>
    </style:style>
    <style:style style:name="P47" style:family="paragraph" style:parent-style-name="Text_20_body" style:list-style-name="L23"/>
    <style:style style:name="P48" style:family="paragraph" style:parent-style-name="Text_20_body" style:list-style-name="L23">
      <style:paragraph-properties fo:margin-top="0in" fo:margin-bottom="0in" style:contextual-spacing="false"/>
    </style:style>
    <style:style style:name="P49" style:family="paragraph" style:parent-style-name="Text_20_body" style:list-style-name="L24"/>
    <style:style style:name="P50" style:family="paragraph" style:parent-style-name="Text_20_body" style:list-style-name="L24">
      <style:paragraph-properties fo:margin-top="0in" fo:margin-bottom="0in" style:contextual-spacing="false"/>
    </style:style>
    <style:style style:name="P51" style:family="paragraph" style:parent-style-name="Text_20_body" style:list-style-name="L25"/>
    <style:style style:name="P52" style:family="paragraph" style:parent-style-name="Text_20_body" style:list-style-name="L25">
      <style:paragraph-properties fo:margin-top="0in" fo:margin-bottom="0in" style:contextual-spacing="false"/>
    </style:style>
    <style:style style:name="P53" style:family="paragraph" style:parent-style-name="Text_20_body" style:list-style-name="L26"/>
    <style:style style:name="P54" style:family="paragraph" style:parent-style-name="Text_20_body" style:list-style-name="L26">
      <style:paragraph-properties fo:margin-top="0in" fo:margin-bottom="0in" style:contextual-spacing="false"/>
    </style:style>
    <style:style style:name="P55" style:family="paragraph" style:parent-style-name="Text_20_body" style:list-style-name="L27"/>
    <style:style style:name="P56" style:family="paragraph" style:parent-style-name="Text_20_body" style:list-style-name="L27">
      <style:paragraph-properties fo:margin-top="0in" fo:margin-bottom="0in" style:contextual-spacing="false"/>
    </style:style>
    <style:style style:name="P57" style:family="paragraph" style:parent-style-name="Text_20_body" style:list-style-name="L28"/>
    <style:style style:name="P58" style:family="paragraph" style:parent-style-name="Text_20_body" style:list-style-name="L28">
      <style:paragraph-properties fo:margin-top="0in" fo:margin-bottom="0in" style:contextual-spacing="false"/>
    </style:style>
    <style:style style:name="P59" style:family="paragraph" style:parent-style-name="Text_20_body" style:list-style-name="L29"/>
    <style:style style:name="P60" style:family="paragraph" style:parent-style-name="Text_20_body" style:list-style-name="L29">
      <style:paragraph-properties fo:margin-top="0in" fo:margin-bottom="0in" style:contextual-spacing="false"/>
    </style:style>
    <style:style style:name="P61" style:family="paragraph" style:parent-style-name="Text_20_body" style:list-style-name="L30"/>
    <style:style style:name="P62" style:family="paragraph" style:parent-style-name="Text_20_body" style:list-style-name="L30">
      <style:paragraph-properties fo:margin-top="0in" fo:margin-bottom="0in" style:contextual-spacing="false"/>
    </style:style>
    <style:style style:name="P63" style:family="paragraph" style:parent-style-name="Text_20_body" style:list-style-name="L31"/>
    <style:style style:name="P64" style:family="paragraph" style:parent-style-name="Text_20_body" style:list-style-name="L31">
      <style:paragraph-properties fo:margin-top="0in" fo:margin-bottom="0in" style:contextual-spacing="false"/>
    </style:style>
    <style:style style:name="P65" style:family="paragraph" style:parent-style-name="Text_20_body" style:list-style-name="L32"/>
    <style:style style:name="P66" style:family="paragraph" style:parent-style-name="Text_20_body" style:list-style-name="L32">
      <style:paragraph-properties fo:margin-top="0in" fo:margin-bottom="0in" style:contextual-spacing="false"/>
    </style:style>
    <style:style style:name="P67" style:family="paragraph" style:parent-style-name="Text_20_body" style:list-style-name="L33"/>
    <style:style style:name="P68" style:family="paragraph" style:parent-style-name="Text_20_body" style:list-style-name="L33">
      <style:paragraph-properties fo:margin-top="0in" fo:margin-bottom="0in" style:contextual-spacing="false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ifferential Drive RC Robot Controlled via ROS2 Humble</text:h>
      <text:h text:style-name="Heading_20_2" text:outline-level="2">Complete Project Report</text:h>
      <text:p text:style-name="Horizontal_20_Line"/>
      <text:h text:style-name="Heading_20_2" text:outline-level="2">Student Details</text:h>
      <text:list xml:id="list642198620" text:style-name="L1">
        <text:list-item>
          <text:p text:style-name="P4"><text:span text:style-name="Strong_20_Emphasis">Name:</text:span> Milind (Team Member) </text:p>
        </text:list-item>
        <text:list-item>
          <text:p text:style-name="P4"><text:span text:style-name="Strong_20_Emphasis">Collaborator:</text:span> Om Sandesh Jumle </text:p>
        </text:list-item>
        <text:list-item>
          <text:p text:style-name="P4"><text:span text:style-name="Strong_20_Emphasis">Department:</text:span> Computer Science and Engineering (CSE) </text:p>
        </text:list-item>
        <text:list-item>
          <text:p text:style-name="P3"><text:span text:style-name="Strong_20_Emphasis">Project Type:</text:span> Electronics/Software Track - Team Titans Challenge </text:p>
        </text:list-item>
      </text:list>
      <text:p text:style-name="Horizontal_20_Line"/>
      <text:h text:style-name="Heading_20_2" text:outline-level="2">1. Project Title</text:h>
      <text:p text:style-name="Text_20_body"><text:span text:style-name="Strong_20_Emphasis">"ROS2-Controlled Differential Drive Robot with Micro-ROS and ESP32 over WiFi"</text:span></text:p>
      <text:p text:style-name="Horizontal_20_Line"/>
      <text:h text:style-name="Heading_20_2" text:outline-level="2">2. Problem Statement</text:h>
      <text:p text:style-name="Text_20_body">Design and develop a differential-drive robot that can be controlled wirelessly using ROS2 Humble through the <text:span text:style-name="Source_20_Text">teleop_twist_keyboard</text:span> package. The robot must:</text:p>
      <text:list xml:id="list457249550" text:style-name="L2">
        <text:list-item>
          <text:p text:style-name="P6">Use two DC motors in differential-drive configuration </text:p>
        </text:list-item>
        <text:list-item>
          <text:p text:style-name="P6">Follow ROS2 communication standards (publish/subscribe to <text:span text:style-name="Source_20_Text">/cmd_vel</text:span> topic) </text:p>
        </text:list-item>
        <text:list-item>
          <text:p text:style-name="P6">Support wireless operation over WiFi using Micro-ROS </text:p>
        </text:list-item>
        <text:list-item>
          <text:p text:style-name="P6">Demonstrate real-time movement based on keyboard commands </text:p>
        </text:list-item>
        <text:list-item>
          <text:p text:style-name="P5">Use custom chassis design without mandatory 3D printing </text:p>
        </text:list-item>
      </text:list>
      <text:p text:style-name="Horizontal_20_Line"/>
      <text:h text:style-name="Heading_20_2" text:outline-level="2">3. What We Did</text:h>
      <text:h text:style-name="Heading_20_3" text:outline-level="3">3.1 Hardware Assembly</text:h>
      <text:list xml:id="list2690993789" text:style-name="L3">
        <text:list-item>
          <text:p text:style-name="P8">Built a custom chassis to mount all components </text:p>
        </text:list-item>
        <text:list-item>
          <text:p text:style-name="P8">Installed two DC motors for differential drive mechanism </text:p>
        </text:list-item>
        <text:list-item>
          <text:p text:style-name="P8">Integrated L298N motor driver for motor control </text:p>
        </text:list-item>
        <text:list-item>
          <text:p text:style-name="P8">Connected ESP32 microcontroller (NodeMCU v3) as the main brain </text:p>
        </text:list-item>
        <text:list-item>
          <text:p text:style-name="P8">Added caster wheel for stability and smooth turning </text:p>
        </text:list-item>
        <text:list-item>
          <text:p text:style-name="P7">Installed 2x 18650 Li-ion battery pack for power supply </text:p>
        </text:list-item>
      </text:list>
      <text:h text:style-name="Heading_20_3" text:outline-level="3"><text:soft-page-break/>3.2 Software Development</text:h>
      <text:list xml:id="list33164553" text:style-name="L4">
        <text:list-item>
          <text:p text:style-name="P9"><text:span text:style-name="Strong_20_Emphasis">ROS2 Environment Setup:</text:span></text:p>
          <text:list>
            <text:list-item>
              <text:p text:style-name="P10">Installed ROS2 Humble on Ubuntu 22.04 </text:p>
            </text:list-item>
            <text:list-item>
              <text:p text:style-name="P10">Created workspace: <text:span text:style-name="Source_20_Text">~/microros_ws</text:span> </text:p>
            </text:list-item>
            <text:list-item>
              <text:p text:style-name="P10">Installed and built Micro-ROS Agent from source </text:p>
            </text:list-item>
          </text:list>
        </text:list-item>
        <text:list-item>
          <text:p text:style-name="P9"><text:span text:style-name="Strong_20_Emphasis">ESP32 Programming:</text:span></text:p>
          <text:list>
            <text:list-item>
              <text:p text:style-name="P10">Configured Arduino IDE with ESP32 board support </text:p>
            </text:list-item>
            <text:list-item>
              <text:p text:style-name="P10">Installed Micro-ROS Arduino library </text:p>
            </text:list-item>
            <text:list-item>
              <text:p text:style-name="P10">Developed firmware to: </text:p>
              <text:list>
                <text:list-item>
                  <text:p text:style-name="P10">Connect to WiFi network </text:p>
                </text:list-item>
                <text:list-item>
                  <text:p text:style-name="P10">Subscribe to <text:span text:style-name="Source_20_Text">/cmd_vel</text:span> topic </text:p>
                </text:list-item>
                <text:list-item>
                  <text:p text:style-name="P10">Convert Twist messages to motor commands </text:p>
                </text:list-item>
                <text:list-item>
                  <text:p text:style-name="P10">Implement differential drive kinematics </text:p>
                </text:list-item>
              </text:list>
            </text:list-item>
          </text:list>
        </text:list-item>
        <text:list-item>
          <text:p text:style-name="P9"><text:span text:style-name="Strong_20_Emphasis">Network Configuration:</text:span></text:p>
          <text:list>
            <text:list-item>
              <text:p text:style-name="P10">Set up UDP communication between PC and ESP32 </text:p>
            </text:list-item>
            <text:list-item>
              <text:p text:style-name="P10">Configured Micro-ROS agent on port 8888 </text:p>
            </text:list-item>
            <text:list-item>
              <text:p text:style-name="P10">Established WiFi transport layer </text:p>
            </text:list-item>
          </text:list>
        </text:list-item>
        <text:list-item>
          <text:p text:style-name="P9"><text:span text:style-name="Strong_20_Emphasis">Integration &amp; Testing:</text:span></text:p>
          <text:list>
            <text:list-item>
              <text:p text:style-name="P10">Tested motor control with manual ROS2 topic publishing </text:p>
            </text:list-item>
            <text:list-item>
              <text:p text:style-name="P10">Integrated <text:span text:style-name="Source_20_Text">teleop_twist_keyboard</text:span> package </text:p>
            </text:list-item>
            <text:list-item>
              <text:p text:style-name="P9">Verified real-time robot control </text:p>
            </text:list-item>
          </text:list>
        </text:list-item>
      </text:list>
      <text:p text:style-name="Horizontal_20_Line"/>
      <text:h text:style-name="Heading_20_2" text:outline-level="2">4. Components Used (Bill of Materials)</text:h>
      <text:h text:style-name="Heading_20_3" text:outline-level="3">4.1 Electronics Compone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Component</text:p>
            </table:table-cell>
            <table:table-cell table:style-name="Table1.A1" office:value-type="string">
              <text:p text:style-name="Table_20_Heading">Specifica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Purpose</text:p>
            </table:table-cell>
            <table:table-cell table:style-name="Table1.A1" office:value-type="string">
              <text:p text:style-name="Table_20_Heading">Estimated Cost (INR)</text:p>
            </table:table-cell>
            <table:table-cell table:style-name="Table1.A1" office:value-type="string">
              <text:p text:style-name="Table_20_Heading">Purchase Link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ESP32 NodeMCU v3</text:span></text:p>
          </table:table-cell>
          <table:table-cell table:style-name="Table1.A1" office:value-type="string">
            <text:p text:style-name="Table_20_Contents">WiFi + Bluetooth, 240MHz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Main microcontroller, runs Micro-ROS client</text:p>
          </table:table-cell>
          <table:table-cell table:style-name="Table1.A1" office:value-type="string">
            <text:p text:style-name="Table_20_Contents">₹400</text:p>
          </table:table-cell>
          <table:table-cell table:style-name="Table1.A1" office:value-type="string">
            <text:p text:style-name="Table_20_Contents"><text:a xlink:type="simple" xlink:href="https://robu.in/product/nodemcu-32s-wifi-bluetooth-board/" text:style-name="Internet_20_link" text:visited-style-name="Visited_20_Internet_20_Link">Robu.in</text:a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298N Motor Driver</text:span></text:p>
          </table:table-cell>
          <table:table-cell table:style-name="Table1.A1" office:value-type="string">
            <text:p text:style-name="Table_20_Contents">Dual H-Bridge, 2A per channe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ontrols DC motor direction and speed</text:p>
          </table:table-cell>
          <table:table-cell table:style-name="Table1.A1" office:value-type="string">
            <text:p text:style-name="Table_20_Contents">₹150</text:p>
          </table:table-cell>
          <table:table-cell table:style-name="Table1.A1" office:value-type="string">
            <text:p text:style-name="Table_20_Contents"><text:a xlink:type="simple" xlink:href="https://www.amazon.in/RobotEra-L298N-Motor-Driver-Controller/dp/B07MY33PC9" text:style-name="Internet_20_link" text:visited-style-name="Visited_20_Internet_20_Link">Amazon</text:a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C Geared Motors</text:span></text:p>
          </table:table-cell>
          <table:table-cell table:style-name="Table1.A1" office:value-type="string">
            <text:p text:style-name="Table_20_Contents">12V, 200 RPM, with wheels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Provides differential drive motion</text:p>
          </table:table-cell>
          <table:table-cell table:style-name="Table1.A1" office:value-type="string">
            <text:p text:style-name="Table_20_Contents">₹300</text:p>
          </table:table-cell>
          <table:table-cell table:style-name="Table1.A1" office:value-type="string">
            <text:p text:style-name="Table_20_Contents"><text:a xlink:type="simple" xlink:href="https://robu.in/product/yellow-dual-shaft-bo-motor-with-wheel/" text:style-name="Internet_20_link" text:visited-style-name="Visited_20_Internet_20_Link">Robu.in</text:a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18650 Li-ion Cells</text:span></text:p>
          </table:table-cell>
          <table:table-cell table:style-name="Table1.A1" office:value-type="string">
            <text:p text:style-name="Table_20_Contents">3.7V, 2600mAh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Power supply for motors and electronics</text:p>
          </table:table-cell>
          <table:table-cell table:style-name="Table1.A1" office:value-type="string">
            <text:p text:style-name="Table_20_Contents">₹200</text:p>
          </table:table-cell>
          <table:table-cell table:style-name="Table1.A1" office:value-type="string">
            <text:p text:style-name="Table_20_Contents">[Local electronics store]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18650 Battery Holder</text:span></text:p>
          </table:table-cell>
          <table:table-cell table:style-name="Table1.A1" office:value-type="string">
            <text:p text:style-name="Table_20_Contents">2-cell series holder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Holds batteries securely</text:p>
          </table:table-cell>
          <table:table-cell table:style-name="Table1.A1" office:value-type="string">
            <text:p text:style-name="Table_20_Contents">₹50</text:p>
          </table:table-cell>
          <table:table-cell table:style-name="Table1.A1" office:value-type="string">
            <text:p text:style-name="Table_20_Contents"><text:a xlink:type="simple" xlink:href="https://www.amazon.in/battery-holder/s?k=18650+battery+holder" text:style-name="Internet_20_link" text:visited-style-name="Visited_20_Internet_20_Link">Amazon</text:a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aster Wheel</text:span></text:p>
          </table:table-cell>
          <table:table-cell table:style-name="Table1.A1" office:value-type="string">
            <text:p text:style-name="Table_20_Contents">360° rotating, ball typ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Provides balance and smooth turning</text:p>
          </table:table-cell>
          <table:table-cell table:style-name="Table1.A1" office:value-type="string">
            <text:p text:style-name="Table_20_Contents">₹80</text:p>
          </table:table-cell>
          <table:table-cell table:style-name="Table1.A1" office:value-type="string">
            <text:p text:style-name="Table_20_Contents"><text:a xlink:type="simple" xlink:href="https://robu.in/product/25mm-universal-wheel-caster/" text:style-name="Internet_20_link" text:visited-style-name="Visited_20_Internet_20_Link">Robu.in</text:a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Jumper Wires</text:span></text:p>
          </table:table-cell>
          <table:table-cell table:style-name="Table1.A1" office:value-type="string">
            <text:p text:style-name="Table_20_Contents">Male-to-Male, Male-to-Female</text:p>
          </table:table-cell>
          <table:table-cell table:style-name="Table1.A1" office:value-type="string">
            <text:p text:style-name="Table_20_Contents">20+</text:p>
          </table:table-cell>
          <table:table-cell table:style-name="Table1.A1" office:value-type="string">
            <text:p text:style-name="Table_20_Contents">Component interconnections</text:p>
          </table:table-cell>
          <table:table-cell table:style-name="Table1.A1" office:value-type="string">
            <text:p text:style-name="Table_20_Contents">₹50</text:p>
          </table:table-cell>
          <table:table-cell table:style-name="Table1.A1" office:value-type="string">
            <text:p text:style-name="Table_20_Contents"><text:a xlink:type="simple" xlink:href="https://www.amazon.in/jumper-wires/s?k=jumper+wires" text:style-name="Internet_20_link" text:visited-style-name="Visited_20_Internet_20_Link">Amazon</text:a>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trong_20_Emphasis">Chassis Material</text:span></text:p>
          </table:table-cell>
          <table:table-cell table:style-name="Table1.A1" office:value-type="string">
            <text:p text:style-name="Table_20_Contents">Acrylic/Cardboard/Plywoo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Robot base structure</text:p>
          </table:table-cell>
          <table:table-cell table:style-name="Table1.A1" office:value-type="string">
            <text:p text:style-name="Table_20_Contents">₹100</text:p>
          </table:table-cell>
          <table:table-cell table:style-name="Table1.A1" office:value-type="string">
            <text:p text:style-name="Table_20_Contents">Local hardware stor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ON/OFF Switch</text:span></text:p>
          </table:table-cell>
          <table:table-cell table:style-name="Table1.A1" office:value-type="string">
            <text:p text:style-name="Table_20_Contents">SPST toggle switc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Power control</text:p>
          </table:table-cell>
          <table:table-cell table:style-name="Table1.A1" office:value-type="string">
            <text:p text:style-name="Table_20_Contents">₹20</text:p>
          </table:table-cell>
          <table:table-cell table:style-name="Table1.A1" office:value-type="string">
            <text:p text:style-name="Table_20_Contents">Local electronics store</text:p>
          </table:table-cell>
        </table:table-row>
      </table:table>
      <text:p text:style-name="Text_20_body"><text:span text:style-name="Strong_20_Emphasis">Total Estimated Cost:</text:span> ₹1,350 INR (~$16 USD)</text:p>
      <text:h text:style-name="Heading_20_3" text:outline-level="3">4.2 Software Requirement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Software</text:p>
            </table:table-cell>
            <table:table-cell table:style-name="Table2.A1" office:value-type="string">
              <text:p text:style-name="Table_20_Heading">Version</text:p>
            </table:table-cell>
            <table:table-cell table:style-name="Table2.A1" office:value-type="string">
              <text:p text:style-name="Table_20_Heading">Purpose</text:p>
            </table:table-cell>
            <table:table-cell table:style-name="Table2.A1" office:value-type="string">
              <text:p text:style-name="Table_20_Heading">Link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Ubuntu</text:span></text:p>
          </table:table-cell>
          <table:table-cell table:style-name="Table2.A1" office:value-type="string">
            <text:p text:style-name="Table_20_Contents">22.04 LTS</text:p>
          </table:table-cell>
          <table:table-cell table:style-name="Table2.A1" office:value-type="string">
            <text:p text:style-name="Table_20_Contents">Operating system</text:p>
          </table:table-cell>
          <table:table-cell table:style-name="Table2.A1" office:value-type="string">
            <text:p text:style-name="Table_20_Contents"><text:a xlink:type="simple" xlink:href="https://ubuntu.com/download/desktop" text:style-name="Internet_20_link" text:visited-style-name="Visited_20_Internet_20_Link">ubuntu.com</text:a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ROS2</text:span></text:p>
          </table:table-cell>
          <table:table-cell table:style-name="Table2.A1" office:value-type="string">
            <text:p text:style-name="Table_20_Contents">Humble Hawksbill</text:p>
          </table:table-cell>
          <table:table-cell table:style-name="Table2.A1" office:value-type="string">
            <text:p text:style-name="Table_20_Contents">Robot middleware framework</text:p>
          </table:table-cell>
          <table:table-cell table:style-name="Table2.A1" office:value-type="string">
            <text:p text:style-name="Table_20_Contents"><text:a xlink:type="simple" xlink:href="https://docs.ros.org/en/humble/Installation.html" text:style-name="Internet_20_link" text:visited-style-name="Visited_20_Internet_20_Link">docs.ros.org</text:a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icro-ROS Agent</text:span></text:p>
          </table:table-cell>
          <table:table-cell table:style-name="Table2.A1" office:value-type="string">
            <text:p text:style-name="Table_20_Contents">Humble branch</text:p>
          </table:table-cell>
          <table:table-cell table:style-name="Table2.A1" office:value-type="string">
            <text:p text:style-name="Table_20_Contents">Bridge between ESP32 and ROS2</text:p>
          </table:table-cell>
          <table:table-cell table:style-name="Table2.A1" office:value-type="string">
            <text:p text:style-name="Table_20_Contents"><text:a xlink:type="simple" xlink:href="https://github.com/micro-ROS/micro-ROS-Agent" text:style-name="Internet_20_link" text:visited-style-name="Visited_20_Internet_20_Link">GitHub</text:a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rduino IDE</text:span></text:p>
          </table:table-cell>
          <table:table-cell table:style-name="Table2.A1" office:value-type="string">
            <text:p text:style-name="Table_20_Contents">2.0+</text:p>
          </table:table-cell>
          <table:table-cell table:style-name="Table2.A1" office:value-type="string">
            <text:p text:style-name="Table_20_Contents">ESP32 programming environment</text:p>
          </table:table-cell>
          <table:table-cell table:style-name="Table2.A1" office:value-type="string">
            <text:p text:style-name="Table_20_Contents"><text:a xlink:type="simple" xlink:href="https://www.arduino.cc/en/software" text:style-name="Internet_20_link" text:visited-style-name="Visited_20_Internet_20_Link">arduino.cc</text:a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SP32 Board Package</text:span></text:p>
          </table:table-cell>
          <table:table-cell table:style-name="Table2.A1" office:value-type="string">
            <text:p text:style-name="Table_20_Contents">2.0+</text:p>
          </table:table-cell>
          <table:table-cell table:style-name="Table2.A1" office:value-type="string">
            <text:p text:style-name="Table_20_Contents">ESP32 support for Arduino</text:p>
          </table:table-cell>
          <table:table-cell table:style-name="Table2.A1" office:value-type="string">
            <text:p text:style-name="Table_20_Contents"><text:a xlink:type="simple" xlink:href="https://github.com/espressif/arduino-esp32" text:style-name="Internet_20_link" text:visited-style-name="Visited_20_Internet_20_Link">GitHub</text:a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icro-ROS Arduino</text:span></text:p>
          </table:table-cell>
          <table:table-cell table:style-name="Table2.A1" office:value-type="string">
            <text:p text:style-name="Table_20_Contents">Latest</text:p>
          </table:table-cell>
          <table:table-cell table:style-name="Table2.A1" office:value-type="string">
            <text:p text:style-name="Table_20_Contents">Micro-ROS client library</text:p>
          </table:table-cell>
          <table:table-cell table:style-name="Table2.A1" office:value-type="string">
            <text:p text:style-name="Table_20_Contents"><text:a xlink:type="simple" xlink:href="https://github.com/micro-ROS/micro_ros_arduino" text:style-name="Internet_20_link" text:visited-style-name="Visited_20_Internet_20_Link">GitHub</text:a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eleop_twist_keyboard</text:span></text:p>
          </table:table-cell>
          <table:table-cell table:style-name="Table2.A1" office:value-type="string">
            <text:p text:style-name="Table_20_Contents">ROS2 Humble</text:p>
          </table:table-cell>
          <table:table-cell table:style-name="Table2.A1" office:value-type="string">
            <text:p text:style-name="Table_20_Contents">Keyboard teleoperation</text:p>
          </table:table-cell>
          <table:table-cell table:style-name="Table2.A1" office:value-type="string">
            <text:p text:style-name="Table_20_Contents"><text:span text:style-name="Source_20_Text">sudo apt install ros-humble-teleop-twist-keyboard</text:span></text:p>
          </table:table-cell>
        </table:table-row>
      </table:table>
      <text:p text:style-name="Horizontal_20_Line"/>
      <text:h text:style-name="Heading_20_2" text:outline-level="2">5. Working Principle</text:h>
      <text:h text:style-name="Heading_20_3" text:outline-level="3">5.1 System Architecture</text:h>
      <text:p text:style-name="Preformatted_20_Text"><text:span text:style-name="Source_20_Text">┌─────────────────┐ <text:s text:c="5"/>WiFi/UDP <text:s text:c="4"/>┌──────────────────┐</text:span></text:p>
      <text:p text:style-name="Preformatted_20_Text"><text:span text:style-name="Source_20_Text">│ <text:s text:c="2"/>PC (Ubuntu) <text:s text:c="2"/>│◄─────────────────►│ <text:s/>ESP32 (Robot) <text:s text:c="2"/>│</text:span></text:p>
      <text:p text:style-name="Preformatted_20_Text"><text:span text:style-name="Source_20_Text">│ <text:s text:c="16"/>│ <text:s text:c="3"/>Port 8888 <text:s text:c="5"/>│ <text:s text:c="17"/>│</text:span></text:p>
      <text:p text:style-name="Preformatted_20_Text"><text:span text:style-name="Source_20_Text">│ <text:s/>ROS2 Humble <text:s text:c="3"/>│ <text:s text:c="18"/>│ <text:s text:c="2"/>Micro-ROS <text:s text:c="5"/>│</text:span></text:p>
      <text:p text:style-name="Preformatted_20_Text"><text:span text:style-name="Source_20_Text">│ <text:s/>- Agent <text:s text:c="7"/>│ <text:s text:c="18"/>│ <text:s text:c="2"/>- Client <text:s text:c="6"/>│</text:span></text:p>
      <text:p text:style-name="Preformatted_20_Text"><text:span text:style-name="Source_20_Text">│ <text:s/>- Teleop <text:s text:c="6"/>│ <text:s text:c="18"/>│ <text:s text:c="2"/>- Motor Ctrl <text:s text:c="2"/>│</text:span></text:p>
      <text:p text:style-name="Preformatted_20_Text"><text:span text:style-name="Source_20_Text">└─────────────────┘ <text:s text:c="18"/>└──────────────────┘</text:span></text:p>
      <text:p text:style-name="Preformatted_20_Text"><text:span text:style-name="Source_20_Text"><text:s text:c="8"/>│ <text:s text:c="37"/>│</text:span></text:p>
      <text:p text:style-name="Preformatted_20_Text"><text:span text:style-name="Source_20_Text"><text:s text:c="8"/>│ <text:s text:c="37"/>▼</text:span></text:p>
      <text:p text:style-name="Preformatted_20_Text"><text:span text:style-name="Source_20_Text"><text:s text:c="8"/>│ <text:s text:c="29"/>┌──────────────┐</text:span></text:p>
      <text:p text:style-name="Preformatted_20_Text"><text:span text:style-name="Source_20_Text"><text:s text:c="8"/>└─────────/cmd_vel────────────►│ <text:s/>L298N Driver│</text:span></text:p>
      <text:p text:style-name="Preformatted_20_Text"><text:span text:style-name="Source_20_Text"><text:s text:c="10"/>(Twist messages) <text:s text:c="12"/>└──────────────┘</text:span></text:p>
      <text:p text:style-name="Preformatted_20_Text"><text:span text:style-name="Source_20_Text"><text:s text:c="46"/>│</text:span></text:p>
      <text:p text:style-name="Preformatted_20_Text"><text:span text:style-name="Source_20_Text"><text:s text:c="36"/>┌─────────┴─────────┐</text:span></text:p>
      <text:p text:style-name="Preformatted_20_Text"><text:span text:style-name="Source_20_Text"><text:s text:c="36"/>▼ <text:s text:c="18"/>▼</text:span></text:p>
      <text:p text:style-name="P1"><text:span text:style-name="Source_20_Text"><text:s text:c="30"/>[Left Motor] <text:s text:c="5"/>[Right Motor]</text:span></text:p>
      <text:h text:style-name="Heading_20_3" text:outline-level="3"><text:soft-page-break/>5.2 Communication Flow</text:h>
      <text:list xml:id="list3597147849" text:style-name="L5">
        <text:list-item>
          <text:p text:style-name="P12"><text:span text:style-name="Strong_20_Emphasis">User Input:</text:span> User presses keys on keyboard (i, j, k, l, etc.) </text:p>
        </text:list-item>
        <text:list-item>
          <text:p text:style-name="P12"><text:span text:style-name="Strong_20_Emphasis">ROS2 Publishing:</text:span> <text:span text:style-name="Source_20_Text">teleop_twist_keyboard</text:span> publishes Twist messages to <text:span text:style-name="Source_20_Text">/cmd_vel</text:span> topic </text:p>
        </text:list-item>
        <text:list-item>
          <text:p text:style-name="P12"><text:span text:style-name="Strong_20_Emphasis">Network Transport:</text:span> Messages sent via UDP to ESP32 at IP:8888 </text:p>
        </text:list-item>
        <text:list-item>
          <text:p text:style-name="P12"><text:span text:style-name="Strong_20_Emphasis">Micro-ROS Processing:</text:span> ESP32 receives messages and extracts: </text:p>
          <text:list>
            <text:list-item>
              <text:p text:style-name="P12"><text:span text:style-name="Source_20_Text">linear.x</text:span> - Forward/backward velocity </text:p>
            </text:list-item>
            <text:list-item>
              <text:p text:style-name="P12"><text:span text:style-name="Source_20_Text">angular.z</text:span> - Rotation velocity </text:p>
            </text:list-item>
          </text:list>
        </text:list-item>
        <text:list-item>
          <text:p text:style-name="P11"><text:span text:style-name="Strong_20_Emphasis">Differential Drive Calculation:</text:span> </text:p>
          <text:p text:style-name="P2"><text:span text:style-name="Source_20_Text">left_speed = linear.x - angular.zright_speed = linear.x + angular.z</text:span></text:p>
        </text:list-item>
        <text:list-item>
          <text:p text:style-name="P12"><text:span text:style-name="Strong_20_Emphasis">Motor Control:</text:span> ESP32 sends PWM signals to L298N: </text:p>
          <text:list>
            <text:list-item>
              <text:p text:style-name="P12">Direction control via IN1, IN2, IN3, IN4 </text:p>
            </text:list-item>
            <text:list-item>
              <text:p text:style-name="P12">Speed control via ENA, ENB (PWM) </text:p>
            </text:list-item>
          </text:list>
        </text:list-item>
        <text:list-item>
          <text:p text:style-name="P11"><text:span text:style-name="Strong_20_Emphasis">Robot Motion:</text:span> Motors rotate, robot moves </text:p>
        </text:list-item>
      </text:list>
      <text:h text:style-name="Heading_20_3" text:outline-level="3">5.3 Differential Drive Kinematic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Table_20_Heading">Command</text:p>
            </table:table-cell>
            <table:table-cell table:style-name="Table3.A1" office:value-type="string">
              <text:p text:style-name="Table_20_Heading">linear.x</text:p>
            </table:table-cell>
            <table:table-cell table:style-name="Table3.A1" office:value-type="string">
              <text:p text:style-name="Table_20_Heading">angular.z</text:p>
            </table:table-cell>
            <table:table-cell table:style-name="Table3.A1" office:value-type="string">
              <text:p text:style-name="Table_20_Heading">Left Motor</text:p>
            </table:table-cell>
            <table:table-cell table:style-name="Table3.A1" office:value-type="string">
              <text:p text:style-name="Table_20_Heading">Right Motor</text:p>
            </table:table-cell>
            <table:table-cell table:style-name="Table3.A1" office:value-type="string">
              <text:p text:style-name="Table_20_Heading">Result</text:p>
            </table:table-cell>
          </table:table-row>
        </table:table-header-rows>
        <table:table-row>
          <table:table-cell table:style-name="Table3.A1" office:value-type="string">
            <text:p text:style-name="Table_20_Contents">Forward</text:p>
          </table:table-cell>
          <table:table-cell table:style-name="Table3.A1" office:value-type="string">
            <text:p text:style-name="Table_20_Contents">+0.5</text:p>
          </table:table-cell>
          <table:table-cell table:style-name="Table3.A1" office:value-type="string">
            <text:p text:style-name="Table_20_Contents">0</text:p>
          </table:table-cell>
          <table:table-cell table:style-name="Table3.A1" office:value-type="string">
            <text:p text:style-name="Table_20_Contents">+0.5</text:p>
          </table:table-cell>
          <table:table-cell table:style-name="Table3.A1" office:value-type="string">
            <text:p text:style-name="Table_20_Contents">+0.5</text:p>
          </table:table-cell>
          <table:table-cell table:style-name="Table3.A1" office:value-type="string">
            <text:p text:style-name="Table_20_Contents">Move forward</text:p>
          </table:table-cell>
        </table:table-row>
        <table:table-row>
          <table:table-cell table:style-name="Table3.A1" office:value-type="string">
            <text:p text:style-name="Table_20_Contents">Backward</text:p>
          </table:table-cell>
          <table:table-cell table:style-name="Table3.A1" office:value-type="string">
            <text:p text:style-name="Table_20_Contents">-0.5</text:p>
          </table:table-cell>
          <table:table-cell table:style-name="Table3.A1" office:value-type="string">
            <text:p text:style-name="Table_20_Contents">0</text:p>
          </table:table-cell>
          <table:table-cell table:style-name="Table3.A1" office:value-type="string">
            <text:p text:style-name="Table_20_Contents">-0.5</text:p>
          </table:table-cell>
          <table:table-cell table:style-name="Table3.A1" office:value-type="string">
            <text:p text:style-name="Table_20_Contents">-0.5</text:p>
          </table:table-cell>
          <table:table-cell table:style-name="Table3.A1" office:value-type="string">
            <text:p text:style-name="Table_20_Contents">Move backward</text:p>
          </table:table-cell>
        </table:table-row>
        <table:table-row>
          <table:table-cell table:style-name="Table3.A1" office:value-type="string">
            <text:p text:style-name="Table_20_Contents">Turn Left</text:p>
          </table:table-cell>
          <table:table-cell table:style-name="Table3.A1" office:value-type="string">
            <text:p text:style-name="Table_20_Contents">0</text:p>
          </table:table-cell>
          <table:table-cell table:style-name="Table3.A1" office:value-type="string">
            <text:p text:style-name="Table_20_Contents">+0.5</text:p>
          </table:table-cell>
          <table:table-cell table:style-name="Table3.A1" office:value-type="string">
            <text:p text:style-name="Table_20_Contents">-0.5</text:p>
          </table:table-cell>
          <table:table-cell table:style-name="Table3.A1" office:value-type="string">
            <text:p text:style-name="Table_20_Contents">+0.5</text:p>
          </table:table-cell>
          <table:table-cell table:style-name="Table3.A1" office:value-type="string">
            <text:p text:style-name="Table_20_Contents">Rotate left (in place)</text:p>
          </table:table-cell>
        </table:table-row>
        <table:table-row>
          <table:table-cell table:style-name="Table3.A1" office:value-type="string">
            <text:p text:style-name="Table_20_Contents">Turn Right</text:p>
          </table:table-cell>
          <table:table-cell table:style-name="Table3.A1" office:value-type="string">
            <text:p text:style-name="Table_20_Contents">0</text:p>
          </table:table-cell>
          <table:table-cell table:style-name="Table3.A1" office:value-type="string">
            <text:p text:style-name="Table_20_Contents">-0.5</text:p>
          </table:table-cell>
          <table:table-cell table:style-name="Table3.A1" office:value-type="string">
            <text:p text:style-name="Table_20_Contents">+0.5</text:p>
          </table:table-cell>
          <table:table-cell table:style-name="Table3.A1" office:value-type="string">
            <text:p text:style-name="Table_20_Contents">-0.5</text:p>
          </table:table-cell>
          <table:table-cell table:style-name="Table3.A1" office:value-type="string">
            <text:p text:style-name="Table_20_Contents">Rotate right (in place)</text:p>
          </table:table-cell>
        </table:table-row>
        <table:table-row>
          <table:table-cell table:style-name="Table3.A1" office:value-type="string">
            <text:p text:style-name="Table_20_Contents">Arc Left</text:p>
          </table:table-cell>
          <table:table-cell table:style-name="Table3.A1" office:value-type="string">
            <text:p text:style-name="Table_20_Contents">+0.5</text:p>
          </table:table-cell>
          <table:table-cell table:style-name="Table3.A1" office:value-type="string">
            <text:p text:style-name="Table_20_Contents">+0.3</text:p>
          </table:table-cell>
          <table:table-cell table:style-name="Table3.A1" office:value-type="string">
            <text:p text:style-name="Table_20_Contents">+0.2</text:p>
          </table:table-cell>
          <table:table-cell table:style-name="Table3.A1" office:value-type="string">
            <text:p text:style-name="Table_20_Contents">+0.8</text:p>
          </table:table-cell>
          <table:table-cell table:style-name="Table3.A1" office:value-type="string">
            <text:p text:style-name="Table_20_Contents">Forward + left curve</text:p>
          </table:table-cell>
        </table:table-row>
        <table:table-row>
          <table:table-cell table:style-name="Table3.A1" office:value-type="string">
            <text:p text:style-name="Table_20_Contents">Arc Right</text:p>
          </table:table-cell>
          <table:table-cell table:style-name="Table3.A1" office:value-type="string">
            <text:p text:style-name="Table_20_Contents">+0.5</text:p>
          </table:table-cell>
          <table:table-cell table:style-name="Table3.A1" office:value-type="string">
            <text:p text:style-name="Table_20_Contents">-0.3</text:p>
          </table:table-cell>
          <table:table-cell table:style-name="Table3.A1" office:value-type="string">
            <text:p text:style-name="Table_20_Contents">+0.8</text:p>
          </table:table-cell>
          <table:table-cell table:style-name="Table3.A1" office:value-type="string">
            <text:p text:style-name="Table_20_Contents">+0.2</text:p>
          </table:table-cell>
          <table:table-cell table:style-name="Table3.A1" office:value-type="string">
            <text:p text:style-name="Table_20_Contents">Forward + right curve</text:p>
          </table:table-cell>
        </table:table-row>
      </table:table>
      <text:p text:style-name="Horizontal_20_Line"/>
      <text:h text:style-name="Heading_20_2" text:outline-level="2">6. Process Map</text:h>
      <text:h text:style-name="Heading_20_3" text:outline-level="3">Phase 1: Planning &amp; Design (Day 1)</text:h>
      <text:p text:style-name="P1"><text:span text:style-name="Source_20_Text">[Requirements Analysis] → [Component Selection] → [Design Circuit] → [Order Parts]</text:span></text:p>
      <text:h text:style-name="Heading_20_3" text:outline-level="3">Phase 2: Hardware Assembly (Day 2-3)</text:h>
      <text:p text:style-name="Preformatted_20_Text"><text:span text:style-name="Source_20_Text">[Build Chassis] → [Mount Motors] → [Install Driver] → [Wire ESP32] → </text:span></text:p>
      <text:p text:style-name="P1"><text:span text:style-name="Source_20_Text">[Add Battery Pack] → [Attach Caster Wheel] → [Testing Connections]</text:span></text:p>
      <text:h text:style-name="Heading_20_3" text:outline-level="3">Phase 3: Software Setup (Day 3-4)</text:h>
      <text:p text:style-name="Preformatted_20_Text"><text:span text:style-name="Source_20_Text">[Install Ubuntu 22.04] → [Install ROS2 Humble] → </text:span></text:p>
      <text:p text:style-name="Preformatted_20_Text"><text:span text:style-name="Source_20_Text">[Setup Workspace] → [Build Micro-ROS Agent] → </text:span></text:p>
      <text:p text:style-name="Preformatted_20_Text"><text:span text:style-name="Source_20_Text">[Configure Arduino IDE] → [Install ESP32 Support] → </text:span></text:p>
      <text:p text:style-name="P1"><text:span text:style-name="Source_20_Text">[Install Micro-ROS Arduino Library]</text:span></text:p>
      <text:h text:style-name="Heading_20_3" text:outline-level="3">Phase 4: Programming &amp; Integration (Day 4-5)</text:h>
      <text:p text:style-name="Preformatted_20_Text"><text:span text:style-name="Source_20_Text">[Write ESP32 Code] → [Configure WiFi] → [Test Motor Control] → </text:span></text:p>
      <text:p text:style-name="Preformatted_20_Text"><text:soft-page-break/><text:span text:style-name="Source_20_Text">[Upload Firmware] → [Start Agent] → [Verify Connection] → </text:span></text:p>
      <text:p text:style-name="P1"><text:span text:style-name="Source_20_Text">[Test cmd_vel Subscription]</text:span></text:p>
      <text:h text:style-name="Heading_20_3" text:outline-level="3">Phase 5: Testing &amp; Debugging (Day 5-6)</text:h>
      <text:p text:style-name="Preformatted_20_Text"><text:span text:style-name="Source_20_Text">[Manual Topic Testing] → [Teleop Integration] → </text:span></text:p>
      <text:p text:style-name="Preformatted_20_Text"><text:span text:style-name="Source_20_Text">[WiFi Connectivity Debug] → [Motor Direction Calibration] → </text:span></text:p>
      <text:p text:style-name="P1"><text:span text:style-name="Source_20_Text">[Speed Tuning] → [Final Testing]</text:span></text:p>
      <text:h text:style-name="Heading_20_3" text:outline-level="3">Phase 6: Documentation (Day 6-7)</text:h>
      <text:p text:style-name="Preformatted_20_Text"><text:span text:style-name="Source_20_Text">[Record Video] → [Capture Screenshots] → [Write Report] → </text:span></text:p>
      <text:p text:style-name="P1"><text:span text:style-name="Source_20_Text">[Create BOM] → [Document Code] → [Submit Deliverables]</text:span></text:p>
      <text:p text:style-name="Horizontal_20_Line"/>
      <text:h text:style-name="Heading_20_2" text:outline-level="2">7. Component Justification</text:h>
      <text:h text:style-name="Heading_20_3" text:outline-level="3">7.1 ESP32 Selection</text:h>
      <text:p text:style-name="Text_20_body"><text:span text:style-name="Strong_20_Emphasis">Why ESP32 over Arduino?</text:span></text:p>
      <text:list xml:id="list4017062339" text:style-name="L6">
        <text:list-item>
          <text:p text:style-name="P14">Built-in WiFi (no additional module needed) </text:p>
        </text:list-item>
        <text:list-item>
          <text:p text:style-name="P14">Sufficient processing power (240MHz dual-core) </text:p>
        </text:list-item>
        <text:list-item>
          <text:p text:style-name="P14">Multiple PWM channels for motor control </text:p>
        </text:list-item>
        <text:list-item>
          <text:p text:style-name="P14">Native support for Micro-ROS </text:p>
        </text:list-item>
        <text:list-item>
          <text:p text:style-name="P13">Cost-effective (~₹400) </text:p>
        </text:list-item>
      </text:list>
      <text:h text:style-name="Heading_20_3" text:outline-level="3">7.2 L298N Motor Driver</text:h>
      <text:p text:style-name="Text_20_body"><text:span text:style-name="Strong_20_Emphasis">Why L298N?</text:span></text:p>
      <text:list xml:id="list770695661" text:style-name="L7">
        <text:list-item>
          <text:p text:style-name="P16">Can drive 2 DC motors simultaneously </text:p>
        </text:list-item>
        <text:list-item>
          <text:p text:style-name="P16">Handles up to 2A per channel (sufficient for our motors) </text:p>
        </text:list-item>
        <text:list-item>
          <text:p text:style-name="P16">Built-in voltage regulator (5V output for ESP32) </text:p>
        </text:list-item>
        <text:list-item>
          <text:p text:style-name="P16">Easy to interface with microcontroller </text:p>
        </text:list-item>
        <text:list-item>
          <text:p text:style-name="P15">Widely available and documented </text:p>
        </text:list-item>
      </text:list>
      <text:h text:style-name="Heading_20_3" text:outline-level="3">7.3 DC Geared Motors</text:h>
      <text:p text:style-name="Text_20_body"><text:span text:style-name="Strong_20_Emphasis">Why 200 RPM geared motors?</text:span></text:p>
      <text:list xml:id="list3044786176" text:style-name="L8">
        <text:list-item>
          <text:p text:style-name="P18">Provides good balance between speed and torque </text:p>
        </text:list-item>
        <text:list-item>
          <text:p text:style-name="P18">Gearing reduces speed but increases torque (better for carrying robot weight) </text:p>
        </text:list-item>
        <text:list-item>
          <text:p text:style-name="P18">Wheels included in package </text:p>
        </text:list-item>
        <text:list-item>
          <text:p text:style-name="P17">12V operation matches our battery voltage </text:p>
        </text:list-item>
      </text:list>
      <text:h text:style-name="Heading_20_3" text:outline-level="3">7.4 18650 Li-ion Batteries</text:h>
      <text:p text:style-name="Text_20_body"><text:span text:style-name="Strong_20_Emphasis">Why 2x 18650 cells?</text:span></text:p>
      <text:list xml:id="list3796717937" text:style-name="L9">
        <text:list-item>
          <text:p text:style-name="P20">2 cells in series = 7.4V nominal (sufficient for 12V motors at reduced speed) </text:p>
        </text:list-item>
        <text:list-item>
          <text:p text:style-name="P20">Rechargeable (cost-effective long-term) </text:p>
        </text:list-item>
        <text:list-item>
          <text:p text:style-name="P20"><text:soft-page-break/>High energy density (longer runtime) </text:p>
        </text:list-item>
        <text:list-item>
          <text:p text:style-name="P19">Commonly available </text:p>
        </text:list-item>
      </text:list>
      <text:h text:style-name="Heading_20_3" text:outline-level="3">7.5 Caster Wheel</text:h>
      <text:p text:style-name="Text_20_body"><text:span text:style-name="Strong_20_Emphasis">Why caster wheel?</text:span></text:p>
      <text:list xml:id="list297928802" text:style-name="L10">
        <text:list-item>
          <text:p text:style-name="P22">Provides third point of contact for stability </text:p>
        </text:list-item>
        <text:list-item>
          <text:p text:style-name="P22">360° rotation allows smooth turning </text:p>
        </text:list-item>
        <text:list-item>
          <text:p text:style-name="P22">Minimal friction during differential drive motion </text:p>
        </text:list-item>
        <text:list-item>
          <text:p text:style-name="P21">Simpler than implementing 4-wheel drive </text:p>
        </text:list-item>
      </text:list>
      <text:p text:style-name="Horizontal_20_Line"/>
      <text:h text:style-name="Heading_20_2" text:outline-level="2">8. Pin Configuration</text:h>
      <text:h text:style-name="Heading_20_3" text:outline-level="3">ESP32 to L298N Connection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ESP32 GPIO</text:p>
            </table:table-cell>
            <table:table-cell table:style-name="Table4.A1" office:value-type="string">
              <text:p text:style-name="Table_20_Heading">L298N Pin</text:p>
            </table:table-cell>
            <table:table-cell table:style-name="Table4.A1" office:value-type="string">
              <text:p text:style-name="Table_20_Heading">Wire Color</text:p>
            </table:table-cell>
            <table:table-cell table:style-name="Table4.A1" office:value-type="string">
              <text:p text:style-name="Table_20_Heading">Function</text:p>
            </table:table-cell>
          </table:table-row>
        </table:table-header-rows>
        <table:table-row>
          <table:table-cell table:style-name="Table4.A1" office:value-type="string">
            <text:p text:style-name="Table_20_Contents">GPIO 5</text:p>
          </table:table-cell>
          <table:table-cell table:style-name="Table4.A1" office:value-type="string">
            <text:p text:style-name="Table_20_Contents">ENA</text:p>
          </table:table-cell>
          <table:table-cell table:style-name="Table4.A1" office:value-type="string">
            <text:p text:style-name="Table_20_Contents">Blue</text:p>
          </table:table-cell>
          <table:table-cell table:style-name="Table4.A1" office:value-type="string">
            <text:p text:style-name="Table_20_Contents">Right Motor PWM Speed</text:p>
          </table:table-cell>
        </table:table-row>
        <table:table-row>
          <table:table-cell table:style-name="Table4.A1" office:value-type="string">
            <text:p text:style-name="Table_20_Contents">GPIO 18</text:p>
          </table:table-cell>
          <table:table-cell table:style-name="Table4.A1" office:value-type="string">
            <text:p text:style-name="Table_20_Contents">IN1</text:p>
          </table:table-cell>
          <table:table-cell table:style-name="Table4.A1" office:value-type="string">
            <text:p text:style-name="Table_20_Contents">Green</text:p>
          </table:table-cell>
          <table:table-cell table:style-name="Table4.A1" office:value-type="string">
            <text:p text:style-name="Table_20_Contents">Right Motor Direction 1</text:p>
          </table:table-cell>
        </table:table-row>
        <table:table-row>
          <table:table-cell table:style-name="Table4.A1" office:value-type="string">
            <text:p text:style-name="Table_20_Contents">GPIO 19</text:p>
          </table:table-cell>
          <table:table-cell table:style-name="Table4.A1" office:value-type="string">
            <text:p text:style-name="Table_20_Contents">IN2</text:p>
          </table:table-cell>
          <table:table-cell table:style-name="Table4.A1" office:value-type="string">
            <text:p text:style-name="Table_20_Contents">Yellow</text:p>
          </table:table-cell>
          <table:table-cell table:style-name="Table4.A1" office:value-type="string">
            <text:p text:style-name="Table_20_Contents">Right Motor Direction 2</text:p>
          </table:table-cell>
        </table:table-row>
        <table:table-row>
          <table:table-cell table:style-name="Table4.A1" office:value-type="string">
            <text:p text:style-name="Table_20_Contents">GPIO 4</text:p>
          </table:table-cell>
          <table:table-cell table:style-name="Table4.A1" office:value-type="string">
            <text:p text:style-name="Table_20_Contents">ENB</text:p>
          </table:table-cell>
          <table:table-cell table:style-name="Table4.A1" office:value-type="string">
            <text:p text:style-name="Table_20_Contents">Blue</text:p>
          </table:table-cell>
          <table:table-cell table:style-name="Table4.A1" office:value-type="string">
            <text:p text:style-name="Table_20_Contents">Left Motor PWM Speed</text:p>
          </table:table-cell>
        </table:table-row>
        <table:table-row>
          <table:table-cell table:style-name="Table4.A1" office:value-type="string">
            <text:p text:style-name="Table_20_Contents">GPIO 16</text:p>
          </table:table-cell>
          <table:table-cell table:style-name="Table4.A1" office:value-type="string">
            <text:p text:style-name="Table_20_Contents">IN3</text:p>
          </table:table-cell>
          <table:table-cell table:style-name="Table4.A1" office:value-type="string">
            <text:p text:style-name="Table_20_Contents">Green</text:p>
          </table:table-cell>
          <table:table-cell table:style-name="Table4.A1" office:value-type="string">
            <text:p text:style-name="Table_20_Contents">Left Motor Direction 1</text:p>
          </table:table-cell>
        </table:table-row>
        <table:table-row>
          <table:table-cell table:style-name="Table4.A1" office:value-type="string">
            <text:p text:style-name="Table_20_Contents">GPIO 17</text:p>
          </table:table-cell>
          <table:table-cell table:style-name="Table4.A1" office:value-type="string">
            <text:p text:style-name="Table_20_Contents">IN4</text:p>
          </table:table-cell>
          <table:table-cell table:style-name="Table4.A1" office:value-type="string">
            <text:p text:style-name="Table_20_Contents">Yellow</text:p>
          </table:table-cell>
          <table:table-cell table:style-name="Table4.A1" office:value-type="string">
            <text:p text:style-name="Table_20_Contents">Left Motor Direction 2</text:p>
          </table:table-cell>
        </table:table-row>
        <table:table-row>
          <table:table-cell table:style-name="Table4.A1" office:value-type="string">
            <text:p text:style-name="Table_20_Contents">GND</text:p>
          </table:table-cell>
          <table:table-cell table:style-name="Table4.A1" office:value-type="string">
            <text:p text:style-name="Table_20_Contents">GND</text:p>
          </table:table-cell>
          <table:table-cell table:style-name="Table4.A1" office:value-type="string">
            <text:p text:style-name="Table_20_Contents">Black</text:p>
          </table:table-cell>
          <table:table-cell table:style-name="Table4.A1" office:value-type="string">
            <text:p text:style-name="Table_20_Contents">Common Ground</text:p>
          </table:table-cell>
        </table:table-row>
      </table:table>
      <text:h text:style-name="Heading_20_3" text:outline-level="3">L298N to Motors &amp; Power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L298N Pin</text:p>
            </table:table-cell>
            <table:table-cell table:style-name="Table5.A1" office:value-type="string">
              <text:p text:style-name="Table_20_Heading">Connection</text:p>
            </table:table-cell>
          </table:table-row>
        </table:table-header-rows>
        <table:table-row>
          <table:table-cell table:style-name="Table5.A1" office:value-type="string">
            <text:p text:style-name="Table_20_Contents">OUT1</text:p>
          </table:table-cell>
          <table:table-cell table:style-name="Table5.A1" office:value-type="string">
            <text:p text:style-name="Table_20_Contents">Right Motor (+)</text:p>
          </table:table-cell>
        </table:table-row>
        <table:table-row>
          <table:table-cell table:style-name="Table5.A1" office:value-type="string">
            <text:p text:style-name="Table_20_Contents">OUT2</text:p>
          </table:table-cell>
          <table:table-cell table:style-name="Table5.A1" office:value-type="string">
            <text:p text:style-name="Table_20_Contents">Right Motor (-)</text:p>
          </table:table-cell>
        </table:table-row>
        <table:table-row>
          <table:table-cell table:style-name="Table5.A1" office:value-type="string">
            <text:p text:style-name="Table_20_Contents">OUT3</text:p>
          </table:table-cell>
          <table:table-cell table:style-name="Table5.A1" office:value-type="string">
            <text:p text:style-name="Table_20_Contents">Left Motor (+)</text:p>
          </table:table-cell>
        </table:table-row>
        <table:table-row>
          <table:table-cell table:style-name="Table5.A1" office:value-type="string">
            <text:p text:style-name="Table_20_Contents">OUT4</text:p>
          </table:table-cell>
          <table:table-cell table:style-name="Table5.A1" office:value-type="string">
            <text:p text:style-name="Table_20_Contents">Left Motor (-)</text:p>
          </table:table-cell>
        </table:table-row>
        <table:table-row>
          <table:table-cell table:style-name="Table5.A1" office:value-type="string">
            <text:p text:style-name="Table_20_Contents">12V</text:p>
          </table:table-cell>
          <table:table-cell table:style-name="Table5.A1" office:value-type="string">
            <text:p text:style-name="Table_20_Contents">Battery (+) 7.4V</text:p>
          </table:table-cell>
        </table:table-row>
        <table:table-row>
          <table:table-cell table:style-name="Table5.A1" office:value-type="string">
            <text:p text:style-name="Table_20_Contents">GND</text:p>
          </table:table-cell>
          <table:table-cell table:style-name="Table5.A1" office:value-type="string">
            <text:p text:style-name="Table_20_Contents">Battery (-)</text:p>
          </table:table-cell>
        </table:table-row>
        <table:table-row>
          <table:table-cell table:style-name="Table5.A1" office:value-type="string">
            <text:p text:style-name="Table_20_Contents">5V Out</text:p>
          </table:table-cell>
          <table:table-cell table:style-name="Table5.A1" office:value-type="string">
            <text:p text:style-name="Table_20_Contents">ESP32 VIN (optional)</text:p>
          </table:table-cell>
        </table:table-row>
      </table:table>
      <text:p text:style-name="Horizontal_20_Line"/>
      <text:h text:style-name="Heading_20_2" text:outline-level="2">9. Code Implementation</text:h>
      <text:h text:style-name="Heading_20_3" text:outline-level="3">9.1 Key Features</text:h>
      <text:list xml:id="list1533926463" text:style-name="L11">
        <text:list-item>
          <text:p text:style-name="P24"><text:span text:style-name="Strong_20_Emphasis">WiFi Connectivity:</text:span> Auto-connects to specified network </text:p>
        </text:list-item>
        <text:list-item>
          <text:p text:style-name="P24"><text:span text:style-name="Strong_20_Emphasis">Reconnection Logic:</text:span> Automatically reconnects if agent disconnects </text:p>
        </text:list-item>
        <text:list-item>
          <text:p text:style-name="P24"><text:span text:style-name="Strong_20_Emphasis">Motor Safety:</text:span> Stops motors immediately on connection loss </text:p>
        </text:list-item>
        <text:list-item>
          <text:p text:style-name="P24"><text:span text:style-name="Strong_20_Emphasis">LED Indicators:</text:span> Visual feedback for connection status </text:p>
        </text:list-item>
        <text:list-item>
          <text:p text:style-name="P24"><text:span text:style-name="Strong_20_Emphasis">Differential Drive:</text:span> Proper kinematic calculations </text:p>
        </text:list-item>
        <text:list-item>
          <text:p text:style-name="P24"><text:span text:style-name="Strong_20_Emphasis">Speed Scaling:</text:span> Adjustable maximum speed (0.0 to 1.0) </text:p>
        </text:list-item>
        <text:list-item>
          <text:p text:style-name="P23"><text:soft-page-break/><text:span text:style-name="Strong_20_Emphasis">Dead Zone:</text:span> Prevents motor jitter when stopped </text:p>
        </text:list-item>
      </text:list>
      <text:h text:style-name="Heading_20_3" text:outline-level="3">9.2 Main Functions</text:h>
      <text:p text:style-name="Preformatted_20_Text"><text:span text:style-name="Source_20_Text">setMotor() <text:s text:c="13"/>// Controls individual motor speed and direction</text:span></text:p>
      <text:p text:style-name="Preformatted_20_Text"><text:span text:style-name="Source_20_Text">stopMotors() <text:s text:c="11"/>// Emergency stop for both motors</text:span></text:p>
      <text:p text:style-name="Preformatted_20_Text"><text:span text:style-name="Source_20_Text">subscription_callback() // Processes incoming cmd_vel messages</text:span></text:p>
      <text:p text:style-name="Preformatted_20_Text"><text:span text:style-name="Source_20_Text">create_entities() <text:s text:c="6"/>// Initializes Micro-ROS nodes and subscribers</text:span></text:p>
      <text:p text:style-name="P1"><text:span text:style-name="Source_20_Text">destroy_entities() <text:s text:c="5"/>// Cleans up on disconnection</text:span></text:p>
      <text:h text:style-name="Heading_20_3" text:outline-level="3">9.3 Configuration Parameters</text:h>
      <text:p text:style-name="Preformatted_20_Text"><text:span text:style-name="Source_20_Text">SPEED_SCALE = 0.8 <text:s text:c="5"/>// Maximum speed (80%)</text:span></text:p>
      <text:p text:style-name="Preformatted_20_Text"><text:span text:style-name="Source_20_Text">PWM_FREQ = 5000 <text:s text:c="7"/>// PWM frequency (5 kHz)</text:span></text:p>
      <text:p text:style-name="Preformatted_20_Text"><text:span text:style-name="Source_20_Text">PWM_RESOLUTION = 8 <text:s text:c="4"/>// 8-bit resolution (0-255)</text:span></text:p>
      <text:p text:style-name="P1"><text:span text:style-name="Source_20_Text">agent_port = 8888 <text:s text:c="5"/>// UDP port for communication</text:span></text:p>
      <text:p text:style-name="Horizontal_20_Line"/>
      <text:h text:style-name="Heading_20_2" text:outline-level="2">10. Testing &amp; Validation</text:h>
      <text:h text:style-name="Heading_20_3" text:outline-level="3">10.1 Hardware Tests</text:h>
      <text:p text:style-name="Text_20_body">✅ Motor polarity verification<text:line-break/>✅ Motor driver functionality<text:line-break/>✅ Power supply stability<text:line-break/>✅ WiFi connectivity range test<text:line-break/>✅ Battery runtime test (~30-45 minutes)</text:p>
      <text:h text:style-name="Heading_20_3" text:outline-level="3">10.2 Software Tests</text:h>
      <text:p text:style-name="Text_20_body">✅ ROS2 node visibility (<text:span text:style-name="Source_20_Text">ros2 node list</text:span>)<text:line-break/>✅ Topic subscription (<text:span text:style-name="Source_20_Text">ros2 topic info /cmd_vel</text:span>)<text:line-break/>✅ Manual cmd_vel publishing<text:line-break/>✅ Teleop keyboard control<text:line-break/>✅ Connection recovery after disconnect</text:p>
      <text:h text:style-name="Heading_20_3" text:outline-level="3">10.3 Movement Tests</text:h>
      <text:p text:style-name="Text_20_body">✅ Forward motion (key: i)<text:line-break/>✅ Backward motion (key: ,)<text:line-break/>✅ Left rotation (key: j)<text:line-break/>✅ Right rotation (key: l)<text:line-break/>✅ Curved paths (keys: u, o, m, .)<text:line-break/>✅ Stop command (key: k)</text:p>
      <text:p text:style-name="Horizontal_20_Line"/>
      <text:h text:style-name="Heading_20_2" text:outline-level="2"><text:soft-page-break/>11. Challenges &amp; Solutions</text:h>
      <text:h text:style-name="Heading_20_3" text:outline-level="3">Challenge 1: WiFi Connection Issues</text:h>
      <text:p text:style-name="Text_20_body"><text:span text:style-name="Strong_20_Emphasis">Problem:</text:span> ESP32 stuck in "Waiting for agent..." loop<text:line-break/><text:span text:style-name="Strong_20_Emphasis">Root Cause:</text:span> PC IP address changed due to DHCP<text:line-break/><text:span text:style-name="Strong_20_Emphasis">Solution:</text:span> Verify PC IP with <text:span text:style-name="Source_20_Text">hostname -I</text:span> and update ESP32 code accordingly</text:p>
      <text:h text:style-name="Heading_20_3" text:outline-level="3">Challenge 2: Motor Direction Reversal</text:h>
      <text:p text:style-name="Text_20_body"><text:span text:style-name="Strong_20_Emphasis">Problem:</text:span> Robot turned opposite direction<text:line-break/><text:span text:style-name="Strong_20_Emphasis">Solution:</text:span> Swapped left/right motor speed calculations in differential drive logic</text:p>
      <text:h text:style-name="Heading_20_3" text:outline-level="3">Challenge 3: Compilation Errors</text:h>
      <text:p text:style-name="Text_20_body"><text:span text:style-name="Strong_20_Emphasis">Problem:</text:span> IPAddress type conversion error<text:line-break/><text:span text:style-name="Strong_20_Emphasis">Solution:</text:span> Changed to pass IP as string directly to <text:span text:style-name="Source_20_Text">set_microros_wifi_transports()</text:span></text:p>
      <text:h text:style-name="Heading_20_3" text:outline-level="3">Challenge 4: Firewall Blocking</text:h>
      <text:p text:style-name="Text_20_body"><text:span text:style-name="Strong_20_Emphasis">Problem:</text:span> UDP packets not reaching ESP32<text:line-break/><text:span text:style-name="Strong_20_Emphasis">Solution:</text:span> Opened port 8888 with <text:span text:style-name="Source_20_Text">sudo ufw allow 8888/udp</text:span></text:p>
      <text:p text:style-name="Horizontal_20_Line"/>
      <text:h text:style-name="Heading_20_2" text:outline-level="2">12. Results &amp; Observations</text:h>
      <text:h text:style-name="Heading_20_3" text:outline-level="3">12.1 Performance Metrics</text:h>
      <text:list xml:id="list3402948683" text:style-name="L12">
        <text:list-item>
          <text:p text:style-name="P26"><text:span text:style-name="Strong_20_Emphasis">WiFi Range:</text:span> ~15-20 meters (limited by router) </text:p>
        </text:list-item>
        <text:list-item>
          <text:p text:style-name="P26"><text:span text:style-name="Strong_20_Emphasis">Latency:</text:span> ~50-100ms (acceptable for teleoperation) </text:p>
        </text:list-item>
        <text:list-item>
          <text:p text:style-name="P26"><text:span text:style-name="Strong_20_Emphasis">Battery Life:</text:span> 30-45 minutes of continuous operation </text:p>
        </text:list-item>
        <text:list-item>
          <text:p text:style-name="P26"><text:span text:style-name="Strong_20_Emphasis">Max Speed:</text:span> ~0.5 m/s (with SPEED_SCALE = 0.8) </text:p>
        </text:list-item>
        <text:list-item>
          <text:p text:style-name="P25"><text:span text:style-name="Strong_20_Emphasis">Turn Radius:</text:span> In-place rotation capable </text:p>
        </text:list-item>
      </text:list>
      <text:h text:style-name="Heading_20_3" text:outline-level="3">12.2 Success Criteria</text:h>
      <text:p text:style-name="Text_20_body">✅ Robot responds to all keyboard commands<text:line-break/>✅ Smooth differential drive motion<text:line-break/>✅ Wireless operation via WiFi<text:line-break/>✅ Stable ROS2 communication<text:line-break/>✅ Automatic reconnection on disconnect<text:line-break/>✅ Real-time control with minimal latency</text:p>
      <text:p text:style-name="Horizontal_20_Line"/>
      <text:h text:style-name="Heading_20_2" text:outline-level="2">13. Compliance with Requirements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Requirement</text:p>
            </table:table-cell>
            <table:table-cell table:style-name="Table6.A1" office:value-type="string">
              <text:p text:style-name="Table_20_Heading">Status</text:p>
            </table:table-cell>
            <table:table-cell table:style-name="Table6.A1" office:value-type="string">
              <text:p text:style-name="Table_20_Heading">Evidence</text:p>
            </table:table-cell>
          </table:table-row>
        </table:table-header-rows>
        <table:table-row>
          <table:table-cell table:style-name="Table6.A1" office:value-type="string">
            <text:p text:style-name="Table_20_Contents">Two motors in differential drive</text:p>
          </table:table-cell>
          <table:table-cell table:style-name="Table6.A1" office:value-type="string">
            <text:p text:style-name="Table_20_Contents">✅ Complete</text:p>
          </table:table-cell>
          <table:table-cell table:style-name="Table6.A1" office:value-type="string">
            <text:p text:style-name="Table_20_Contents">Physical robot uses 2 DC motors</text:p>
          </table:table-cell>
        </table:table-row>
        <text:soft-page-break/>
        <table:table-row>
          <table:table-cell table:style-name="Table6.A1" office:value-type="string">
            <text:p text:style-name="Table_20_Contents">ROS2 teleop keyboard control</text:p>
          </table:table-cell>
          <table:table-cell table:style-name="Table6.A1" office:value-type="string">
            <text:p text:style-name="Table_20_Contents">✅ Complete</text:p>
          </table:table-cell>
          <table:table-cell table:style-name="Table6.A1" office:value-type="string">
            <text:p text:style-name="Table_20_Contents">Successfully controlled via teleop_twist_keyboard</text:p>
          </table:table-cell>
        </table:table-row>
        <table:table-row>
          <table:table-cell table:style-name="Table6.A1" office:value-type="string">
            <text:p text:style-name="Table_20_Contents">Custom chassis (no mandatory 3D print)</text:p>
          </table:table-cell>
          <table:table-cell table:style-name="Table6.A1" office:value-type="string">
            <text:p text:style-name="Table_20_Contents">✅ Complete</text:p>
          </table:table-cell>
          <table:table-cell table:style-name="Table6.A1" office:value-type="string">
            <text:p text:style-name="Table_20_Contents">Used acrylic/cardboard chassis</text:p>
          </table:table-cell>
        </table:table-row>
        <table:table-row>
          <table:table-cell table:style-name="Table6.A1" office:value-type="string">
            <text:p text:style-name="Table_20_Contents">Independent component selection</text:p>
          </table:table-cell>
          <table:table-cell table:style-name="Table6.A1" office:value-type="string">
            <text:p text:style-name="Table_20_Contents">✅ Complete</text:p>
          </table:table-cell>
          <table:table-cell table:style-name="Table6.A1" office:value-type="string">
            <text:p text:style-name="Table_20_Contents">BOM created without copying tutorials</text:p>
          </table:table-cell>
        </table:table-row>
        <table:table-row>
          <table:table-cell table:style-name="Table6.A1" office:value-type="string">
            <text:p text:style-name="Table_20_Contents">Physical working robot</text:p>
          </table:table-cell>
          <table:table-cell table:style-name="Table6.A1" office:value-type="string">
            <text:p text:style-name="Table_20_Contents">✅ Complete</text:p>
          </table:table-cell>
          <table:table-cell table:style-name="Table6.A1" office:value-type="string">
            <text:p text:style-name="Table_20_Contents">Demonstrated in video</text:p>
          </table:table-cell>
        </table:table-row>
        <table:table-row>
          <table:table-cell table:style-name="Table6.A1" office:value-type="string">
            <text:p text:style-name="Table_20_Contents">WiFi communication</text:p>
          </table:table-cell>
          <table:table-cell table:style-name="Table6.A1" office:value-type="string">
            <text:p text:style-name="Table_20_Contents">✅ Complete</text:p>
          </table:table-cell>
          <table:table-cell table:style-name="Table6.A1" office:value-type="string">
            <text:p text:style-name="Table_20_Contents">Micro-ROS over UDP</text:p>
          </table:table-cell>
        </table:table-row>
      </table:table>
      <text:p text:style-name="Horizontal_20_Line"/>
      <text:h text:style-name="Heading_20_2" text:outline-level="2">14. Deliverables</text:h>
      <text:h text:style-name="Heading_20_3" text:outline-level="3">14.1 Video Demonstration</text:h>
      <text:p text:style-name="Text_20_body"><text:span text:style-name="Strong_20_Emphasis">Content:</text:span></text:p>
      <text:list xml:id="list1099825873" text:style-name="L13">
        <text:list-item>
          <text:p text:style-name="P28">Robot shown from all angles </text:p>
        </text:list-item>
        <text:list-item>
          <text:p text:style-name="P28">Live movement demonstration </text:p>
        </text:list-item>
        <text:list-item>
          <text:p text:style-name="P28">Component explanation (ESP32, L298N, motors, batteries, caster wheel) </text:p>
        </text:list-item>
        <text:list-item>
          <text:p text:style-name="P28">ROS2 teleop keyboard control in action </text:p>
        </text:list-item>
        <text:list-item>
          <text:p text:style-name="P27">Terminal showing ROS2 commands </text:p>
        </text:list-item>
      </text:list>
      <text:h text:style-name="Heading_20_3" text:outline-level="3">14.2 Source Code</text:h>
      <text:list xml:id="list2212230351" text:style-name="L14">
        <text:list-item>
          <text:p text:style-name="P30">Complete ESP32 firmware (Arduino sketch) </text:p>
        </text:list-item>
        <text:list-item>
          <text:p text:style-name="P30">Pin configuration </text:p>
        </text:list-item>
        <text:list-item>
          <text:p text:style-name="P30">WiFi credentials template </text:p>
        </text:list-item>
        <text:list-item>
          <text:p text:style-name="P29">Comments explaining logic </text:p>
        </text:list-item>
      </text:list>
      <text:h text:style-name="Heading_20_3" text:outline-level="3">14.3 Documentation</text:h>
      <text:list xml:id="list3139573437" text:style-name="L15">
        <text:list-item>
          <text:p text:style-name="P32">Complete BOM with links </text:p>
        </text:list-item>
        <text:list-item>
          <text:p text:style-name="P32">Wiring diagram </text:p>
        </text:list-item>
        <text:list-item>
          <text:p text:style-name="P32">Setup instructions </text:p>
        </text:list-item>
        <text:list-item>
          <text:p text:style-name="P32">Troubleshooting guide </text:p>
        </text:list-item>
        <text:list-item>
          <text:p text:style-name="P31">This comprehensive report </text:p>
        </text:list-item>
      </text:list>
      <text:p text:style-name="Horizontal_20_Line"/>
      <text:h text:style-name="Heading_20_2" text:outline-level="2">15. Future Enhancements</text:h>
      <text:h text:style-name="Heading_20_3" text:outline-level="3">15.1 Hardware Improvements</text:h>
      <text:list xml:id="list4201833750" text:style-name="L16">
        <text:list-item>
          <text:p text:style-name="P34">Add ultrasonic sensors for obstacle avoidance </text:p>
        </text:list-item>
        <text:list-item>
          <text:p text:style-name="P34">Implement encoder feedback for odometry </text:p>
        </text:list-item>
        <text:list-item>
          <text:p text:style-name="P34">Add IMU for better orientation tracking </text:p>
        </text:list-item>
        <text:list-item>
          <text:p text:style-name="P34">Upgrade to higher capacity batteries </text:p>
        </text:list-item>
        <text:list-item>
          <text:p text:style-name="P33">3D print custom chassis for better aesthetics </text:p>
        </text:list-item>
      </text:list>
      <text:h text:style-name="Heading_20_3" text:outline-level="3"><text:soft-page-break/>15.2 Software Improvements</text:h>
      <text:list xml:id="list2947027489" text:style-name="L17">
        <text:list-item>
          <text:p text:style-name="P36">Implement autonomous navigation with Nav2 </text:p>
        </text:list-item>
        <text:list-item>
          <text:p text:style-name="P36">Add SLAM (Simultaneous Localization and Mapping) </text:p>
        </text:list-item>
        <text:list-item>
          <text:p text:style-name="P36">Create custom ROS2 nodes for sensor fusion </text:p>
        </text:list-item>
        <text:list-item>
          <text:p text:style-name="P36">Implement PID control for precise speed regulation </text:p>
        </text:list-item>
        <text:list-item>
          <text:p text:style-name="P35">Add camera for visual feedback </text:p>
        </text:list-item>
      </text:list>
      <text:h text:style-name="Heading_20_3" text:outline-level="3">15.3 Communication Improvements</text:h>
      <text:list xml:id="list3248031106" text:style-name="L18">
        <text:list-item>
          <text:p text:style-name="P38">Implement fallback to serial if WiFi fails </text:p>
        </text:list-item>
        <text:list-item>
          <text:p text:style-name="P38">Add encryption for secure communication </text:p>
        </text:list-item>
        <text:list-item>
          <text:p text:style-name="P38">Support multiple robot control from single PC </text:p>
        </text:list-item>
        <text:list-item>
          <text:p text:style-name="P37">Implement telemetry publishing (battery, speed, position) </text:p>
        </text:list-item>
      </text:list>
      <text:p text:style-name="Horizontal_20_Line"/>
      <text:h text:style-name="Heading_20_2" text:outline-level="2">16. Learning Outcomes</text:h>
      <text:h text:style-name="Heading_20_3" text:outline-level="3">16.1 Technical Skills Gained</text:h>
      <text:list xml:id="list3759562592" text:style-name="L19">
        <text:list-item>
          <text:p text:style-name="P40">ROS2 framework understanding (nodes, topics, messages) </text:p>
        </text:list-item>
        <text:list-item>
          <text:p text:style-name="P40">Micro-ROS integration with embedded systems </text:p>
        </text:list-item>
        <text:list-item>
          <text:p text:style-name="P40">ESP32 programming and WiFi configuration </text:p>
        </text:list-item>
        <text:list-item>
          <text:p text:style-name="P40">Motor control and PWM signal generation </text:p>
        </text:list-item>
        <text:list-item>
          <text:p text:style-name="P40">Differential drive kinematics </text:p>
        </text:list-item>
        <text:list-item>
          <text:p text:style-name="P40">Network programming (UDP communication) </text:p>
        </text:list-item>
        <text:list-item>
          <text:p text:style-name="P39">Debugging embedded systems </text:p>
        </text:list-item>
      </text:list>
      <text:h text:style-name="Heading_20_3" text:outline-level="3">16.2 Soft Skills Developed</text:h>
      <text:list xml:id="list2616256603" text:style-name="L20">
        <text:list-item>
          <text:p text:style-name="P42">Problem-solving under constraints </text:p>
        </text:list-item>
        <text:list-item>
          <text:p text:style-name="P42">Documentation and report writing </text:p>
        </text:list-item>
        <text:list-item>
          <text:p text:style-name="P42">Time management for project milestones </text:p>
        </text:list-item>
        <text:list-item>
          <text:p text:style-name="P42">Independent learning from documentation </text:p>
        </text:list-item>
        <text:list-item>
          <text:p text:style-name="P41">Systematic debugging approach </text:p>
        </text:list-item>
      </text:list>
      <text:p text:style-name="Horizontal_20_Line"/>
      <text:h text:style-name="Heading_20_2" text:outline-level="2">17. Conclusion</text:h>
      <text:p text:style-name="Text_20_body">This project successfully demonstrates a <text:span text:style-name="Strong_20_Emphasis">fully functional differential-drive robot controlled wirelessly via ROS2 Humble</text:span>. The implementation meets all requirements specified in the Team Titans Electronics/Software Track challenge.</text:p>
      <text:h text:style-name="Heading_20_3" text:outline-level="3">Key Achievements:</text:h>
      <text:list xml:id="list1055347366" text:style-name="L21">
        <text:list-item>
          <text:p text:style-name="P44">✅ <text:span text:style-name="Strong_20_Emphasis">Complete Hardware Integration:</text:span> Successfully assembled robot with ESP32, L298N, DC motors, and power supply </text:p>
        </text:list-item>
        <text:list-item>
          <text:p text:style-name="P44"><text:soft-page-break/>✅ <text:span text:style-name="Strong_20_Emphasis">ROS2 Communication:</text:span> Established reliable WiFi-based communication using Micro-ROS </text:p>
        </text:list-item>
        <text:list-item>
          <text:p text:style-name="P44">✅ <text:span text:style-name="Strong_20_Emphasis">Wireless Control:</text:span> Achieved real-time teleoperation using teleop_twist_keyboard </text:p>
        </text:list-item>
        <text:list-item>
          <text:p text:style-name="P44">✅ <text:span text:style-name="Strong_20_Emphasis">Differential Drive:</text:span> Implemented proper kinematic calculations for smooth motion </text:p>
        </text:list-item>
        <text:list-item>
          <text:p text:style-name="P43">✅ <text:span text:style-name="Strong_20_Emphasis">Robust Design:</text:span> Automatic reconnection and motor safety features </text:p>
        </text:list-item>
      </text:list>
      <text:h text:style-name="Heading_20_3" text:outline-level="3">Technical Highlights:</text:h>
      <text:list xml:id="list2833936423" text:style-name="L22">
        <text:list-item>
          <text:p text:style-name="P46"><text:span text:style-name="Strong_20_Emphasis">Wireless Freedom:</text:span> No cable constraints, WiFi range up to 20m </text:p>
        </text:list-item>
        <text:list-item>
          <text:p text:style-name="P46"><text:span text:style-name="Strong_20_Emphasis">Standard Compliance:</text:span> Full ROS2 message compatibility </text:p>
        </text:list-item>
        <text:list-item>
          <text:p text:style-name="P46"><text:span text:style-name="Strong_20_Emphasis">Modular Design:</text:span> Easy to add sensors and capabilities </text:p>
        </text:list-item>
        <text:list-item>
          <text:p text:style-name="P46"><text:span text:style-name="Strong_20_Emphasis">Cost-Effective:</text:span> Total cost under ₹1,500 </text:p>
        </text:list-item>
        <text:list-item>
          <text:p text:style-name="P45"><text:span text:style-name="Strong_20_Emphasis">Well-Documented:</text:span> Complete code comments and setup guide </text:p>
        </text:list-item>
      </text:list>
      <text:h text:style-name="Heading_20_3" text:outline-level="3">Project Impact:</text:h>
      <text:p text:style-name="Text_20_body">This project demonstrates practical understanding of:</text:p>
      <text:list xml:id="list3645477268" text:style-name="L23">
        <text:list-item>
          <text:p text:style-name="P48">Robotics fundamentals and kinematics </text:p>
        </text:list-item>
        <text:list-item>
          <text:p text:style-name="P48">Embedded systems programming </text:p>
        </text:list-item>
        <text:list-item>
          <text:p text:style-name="P48">Network communication protocols </text:p>
        </text:list-item>
        <text:list-item>
          <text:p text:style-name="P48">Hardware-software integration </text:p>
        </text:list-item>
        <text:list-item>
          <text:p text:style-name="P47">ROS2 middleware framework </text:p>
        </text:list-item>
      </text:list>
      <text:p text:style-name="Text_20_body">The robot serves as an excellent foundation for future robotics projects and can be easily extended with additional sensors, cameras, and autonomous capabilities.</text:p>
      <text:p text:style-name="Horizontal_20_Line"/>
      <text:h text:style-name="Heading_20_2" text:outline-level="2">18. References</text:h>
      <text:h text:style-name="Heading_20_3" text:outline-level="3">Documentation</text:h>
      <text:list xml:id="list2958692537" text:style-name="L24">
        <text:list-item>
          <text:p text:style-name="P50">ROS2 Humble Documentation: https://docs.ros.org/en/humble/ </text:p>
        </text:list-item>
        <text:list-item>
          <text:p text:style-name="P50">Micro-ROS Documentation: https://micro.ros.org/docs/ </text:p>
        </text:list-item>
        <text:list-item>
          <text:p text:style-name="P50">ESP32 Arduino Core: https://github.com/espressif/arduino-esp32 </text:p>
        </text:list-item>
        <text:list-item>
          <text:p text:style-name="P49">teleop_twist_keyboard: https://index.ros.org/p/teleop_twist_keyboard/ </text:p>
        </text:list-item>
      </text:list>
      <text:h text:style-name="Heading_20_3" text:outline-level="3">Tutorials &amp; Guides</text:h>
      <text:list xml:id="list1891801452" text:style-name="L25">
        <text:list-item>
          <text:p text:style-name="P52">Micro-ROS for Arduino: https://github.com/micro-ROS/micro_ros_arduino </text:p>
        </text:list-item>
        <text:list-item>
          <text:p text:style-name="P52">Micro-ROS Agent Setup: https://github.com/micro-ROS/micro-ROS-Agent </text:p>
        </text:list-item>
        <text:list-item>
          <text:p text:style-name="P52">ROS2 Publisher/Subscriber Tutorial: https://docs.ros.org/en/humble/Tutorials/ </text:p>
        </text:list-item>
        <text:list-item>
          <text:p text:style-name="P51">L298N Motor Driver Guide: Various online resources </text:p>
        </text:list-item>
      </text:list>
      <text:h text:style-name="Heading_20_3" text:outline-level="3">Hardware References</text:h>
      <text:list xml:id="list3539505335" text:style-name="L26">
        <text:list-item>
          <text:p text:style-name="P54">ESP32 Datasheet: Espressif Systems </text:p>
        </text:list-item>
        <text:list-item>
          <text:p text:style-name="P54">L298N Datasheet: STMicroelectronics </text:p>
        </text:list-item>
        <text:list-item>
          <text:p text:style-name="P53">DC Motor Specifications: Manufacturer datasheets </text:p>
        </text:list-item>
      </text:list>
      <text:p text:style-name="Horizontal_20_Line"/>
      <text:h text:style-name="Heading_20_2" text:outline-level="2"><text:soft-page-break/>19. Acknowledgments</text:h>
      <text:list xml:id="list1071687319" text:style-name="L27">
        <text:list-item>
          <text:p text:style-name="P56"><text:span text:style-name="Strong_20_Emphasis">Team Titans</text:span> - For providing the challenging problem statement </text:p>
        </text:list-item>
        <text:list-item>
          <text:p text:style-name="P56"><text:span text:style-name="Strong_20_Emphasis">ROS2 Community</text:span> - For comprehensive documentation </text:p>
        </text:list-item>
        <text:list-item>
          <text:p text:style-name="P56"><text:span text:style-name="Strong_20_Emphasis">Micro-ROS Team</text:span> - For embedded ROS2 support </text:p>
        </text:list-item>
        <text:list-item>
          <text:p text:style-name="P55"><text:span text:style-name="Strong_20_Emphasis">Online Forums</text:span> - Stack Overflow, ROS Answers for troubleshooting </text:p>
        </text:list-item>
      </text:list>
      <text:p text:style-name="Horizontal_20_Line"/>
      <text:h text:style-name="Heading_20_2" text:outline-level="2">Appendix A: Complete Parts List with Links</text:h>
      <text:h text:style-name="Heading_20_3" text:outline-level="3">Electronics</text:h>
      <text:list xml:id="list216015961" text:style-name="L28">
        <text:list-item>
          <text:p text:style-name="P58"><text:span text:style-name="Strong_20_Emphasis">ESP32 NodeMCU v3</text:span>: https://robu.in/product/nodemcu-32s-wifi-bluetooth-board/ </text:p>
        </text:list-item>
        <text:list-item>
          <text:p text:style-name="P58"><text:span text:style-name="Strong_20_Emphasis">L298N Driver</text:span>: https://www.amazon.in/RobotEra-L298N-Motor-Driver-Controller/dp/B07MY33PC9 </text:p>
        </text:list-item>
        <text:list-item>
          <text:p text:style-name="P58"><text:span text:style-name="Strong_20_Emphasis">DC Motors with Wheels</text:span>: https://robu.in/product/yellow-dual-shaft-bo-motor-with-wheel/ </text:p>
        </text:list-item>
        <text:list-item>
          <text:p text:style-name="P58"><text:span text:style-name="Strong_20_Emphasis">18650 Cells</text:span>: Local electronics store </text:p>
        </text:list-item>
        <text:list-item>
          <text:p text:style-name="P58"><text:span text:style-name="Strong_20_Emphasis">Battery Holder</text:span>: https://www.amazon.in/s?k=18650+battery+holder </text:p>
        </text:list-item>
        <text:list-item>
          <text:p text:style-name="P58"><text:span text:style-name="Strong_20_Emphasis">Caster Wheel</text:span>: https://robu.in/product/25mm-universal-wheel-caster/ </text:p>
        </text:list-item>
        <text:list-item>
          <text:p text:style-name="P57"><text:span text:style-name="Strong_20_Emphasis">Jumper Wires</text:span>: https://www.amazon.in/s?k=jumper+wires </text:p>
        </text:list-item>
      </text:list>
      <text:h text:style-name="Heading_20_3" text:outline-level="3">Software</text:h>
      <text:list xml:id="list1771387267" text:style-name="L29">
        <text:list-item>
          <text:p text:style-name="P60"><text:span text:style-name="Strong_20_Emphasis">Ubuntu 22.04</text:span>: https://ubuntu.com/download/desktop </text:p>
        </text:list-item>
        <text:list-item>
          <text:p text:style-name="P60"><text:span text:style-name="Strong_20_Emphasis">ROS2 Humble</text:span>: https://docs.ros.org/en/humble/Installation.html </text:p>
        </text:list-item>
        <text:list-item>
          <text:p text:style-name="P60"><text:span text:style-name="Strong_20_Emphasis">Arduino IDE</text:span>: https://www.arduino.cc/en/software </text:p>
        </text:list-item>
        <text:list-item>
          <text:p text:style-name="P59"><text:span text:style-name="Strong_20_Emphasis">Micro-ROS Arduino</text:span>: https://github.com/micro-ROS/micro_ros_arduino </text:p>
        </text:list-item>
      </text:list>
      <text:p text:style-name="Horizontal_20_Line"/>
      <text:h text:style-name="Heading_20_2" text:outline-level="2">Appendix B: Quick Start Guide</text:h>
      <text:h text:style-name="Heading_20_3" text:outline-level="3">For Future Users:</text:h>
      <text:p text:style-name="Text_20_body"><text:span text:style-name="Strong_20_Emphasis">1. Hardware Setup</text:span> (30 minutes)</text:p>
      <text:list xml:id="list702171257" text:style-name="L30">
        <text:list-item>
          <text:p text:style-name="P62">Assemble chassis </text:p>
        </text:list-item>
        <text:list-item>
          <text:p text:style-name="P62">Mount motors and driver </text:p>
        </text:list-item>
        <text:list-item>
          <text:p text:style-name="P62">Wire according to pin diagram </text:p>
        </text:list-item>
        <text:list-item>
          <text:p text:style-name="P61">Install batteries </text:p>
        </text:list-item>
      </text:list>
      <text:p text:style-name="Text_20_body"><text:span text:style-name="Strong_20_Emphasis">2. Software Setup</text:span> (2 hours)</text:p>
      <text:list xml:id="list2588137731" text:style-name="L31">
        <text:list-item>
          <text:p text:style-name="P64">Install Ubuntu 22.04 </text:p>
        </text:list-item>
        <text:list-item>
          <text:p text:style-name="P64">Install ROS2 Humble </text:p>
        </text:list-item>
        <text:list-item>
          <text:p text:style-name="P64">Build Micro-ROS Agent </text:p>
        </text:list-item>
        <text:list-item>
          <text:p text:style-name="P63">Setup Arduino IDE </text:p>
        </text:list-item>
      </text:list>
      <text:p text:style-name="Text_20_body"><text:span text:style-name="Strong_20_Emphasis">3. Programming</text:span> (1 hour)</text:p>
      <text:list xml:id="list2096496109" text:style-name="L32">
        <text:list-item>
          <text:p text:style-name="P66">Update WiFi credentials in code </text:p>
        </text:list-item>
        <text:list-item>
          <text:p text:style-name="P66"><text:soft-page-break/>Update PC IP address </text:p>
        </text:list-item>
        <text:list-item>
          <text:p text:style-name="P65">Upload to ESP32 </text:p>
        </text:list-item>
      </text:list>
      <text:p text:style-name="Text_20_body"><text:span text:style-name="Strong_20_Emphasis">4. Testing</text:span> (30 minutes)</text:p>
      <text:list xml:id="list1278353212" text:style-name="L33">
        <text:list-item>
          <text:p text:style-name="P68">Start Micro-ROS Agent </text:p>
        </text:list-item>
        <text:list-item>
          <text:p text:style-name="P68">Verify connection </text:p>
        </text:list-item>
        <text:list-item>
          <text:p text:style-name="P67">Test with teleop keyboard </text:p>
        </text:list-item>
      </text:list>
      <text:p text:style-name="Text_20_body"><text:span text:style-name="Strong_20_Emphasis">Total Setup Time:</text:span> ~4 hours</text:p>
      <text:p text:style-name="Horizontal_20_Line"/>
      <text:p text:style-name="Text_20_body"><text:span text:style-name="Strong_20_Emphasis">Project Status:</text:span> ✅ <text:span text:style-name="Strong_20_Emphasis">COMPLETE &amp; FUNCTIONAL</text:span><text:line-break/><text:span text:style-name="Strong_20_Emphasis">Report Version:</text:span> 1.0<text:line-break/><text:span text:style-name="Strong_20_Emphasis">Date:</text:span> December 2024<text:line-break/><text:span text:style-name="Strong_20_Emphasis">Repository:</text:span> [Add GitHub link if applicable]</text:p>
      <text:p text:style-name="Horizontal_20_Line"/>
      <text:p text:style-name="Text_20_body"><text:span text:style-name="Emphasis">End of Report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5T19:13:20.563837096</meta:creation-date>
    <dc:date>2025-12-25T20:03:49.174730181</dc:date>
    <meta:editing-duration>PT20M18S</meta:editing-duration>
    <meta:editing-cycles>1</meta:editing-cycles>
    <meta:document-statistic meta:table-count="6" meta:image-count="0" meta:object-count="0" meta:page-count="13" meta:paragraph-count="519" meta:word-count="2370" meta:character-count="16721" meta:non-whitespace-character-count="14313"/>
    <meta:generator>LibreOffice/7.3.7.2$Linux_X86_64 LibreOffice_project/30$Build-2</meta:generator>
  </office:meta>
</office:document-meta>
</file>